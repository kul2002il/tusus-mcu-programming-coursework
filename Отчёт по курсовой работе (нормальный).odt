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24C5CA8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Абзац_20_названия_20_рисунка">
      <style:text-properties officeooo:rsid="00d108e5" officeooo:paragraph-rsid="00d108e5"/>
    </style:style>
    <style:style style:name="P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Endnote">
      <style:text-properties officeooo:rsid="00be3b93" officeooo:paragraph-rsid="00bed50a"/>
    </style:style>
    <style:style style:name="P5" style:family="paragraph" style:parent-style-name="Endnote">
      <style:text-properties officeooo:rsid="00c75def" officeooo:paragraph-rsid="00c947dd"/>
    </style:style>
    <style:style style:name="P6" style:family="paragraph" style:parent-style-name="Endnote">
      <style:text-properties officeooo:paragraph-rsid="00c75def"/>
    </style:style>
    <style:style style:name="P7" style:family="paragraph" style:parent-style-name="Endnote">
      <style:text-properties officeooo:paragraph-rsid="00c947dd"/>
    </style:style>
    <style:style style:name="P8" style:family="paragraph" style:parent-style-name="Endnote">
      <style:text-properties officeooo:rsid="00cf12d9" officeooo:paragraph-rsid="00cf12d9"/>
    </style:style>
    <style:style style:name="P9" style:family="paragraph" style:parent-style-name="Endnote">
      <style:text-properties officeooo:rsid="00d108e5" officeooo:paragraph-rsid="00d108e5"/>
    </style:style>
    <style:style style:name="P10" style:family="paragraph" style:parent-style-name="Heading">
      <style:paragraph-properties fo:break-before="page"/>
    </style:style>
    <style:style style:name="P11" style:family="paragraph" style:parent-style-name="Heading">
      <style:paragraph-properties fo:break-before="page"/>
      <style:text-properties officeooo:paragraph-rsid="00c1863a"/>
    </style:style>
    <style:style style:name="P12" style:family="paragraph" style:parent-style-name="Preformatted_20_Text">
      <style:text-properties officeooo:paragraph-rsid="00cb3453"/>
    </style:style>
    <style:style style:name="P13" style:family="paragraph" style:parent-style-name="Text_20_body" style:list-style-name="Numbering_20_123"/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text-properties officeooo:rsid="00c56d67" officeooo:paragraph-rsid="00c56d67"/>
    </style:style>
    <style:style style:name="P16" style:family="paragraph" style:parent-style-name="Text_20_body">
      <style:text-properties officeooo:rsid="00c75def" officeooo:paragraph-rsid="00c75def"/>
    </style:style>
    <style:style style:name="P17" style:family="paragraph" style:parent-style-name="Text_20_body">
      <style:text-properties officeooo:paragraph-rsid="00cec8bd"/>
    </style:style>
    <style:style style:name="P18" style:family="paragraph" style:parent-style-name="Text_20_body">
      <style:text-properties officeooo:rsid="00cf12d9" officeooo:paragraph-rsid="00cf12d9"/>
    </style:style>
    <style:style style:name="P19" style:family="paragraph" style:parent-style-name="Text_20_body">
      <style:text-properties officeooo:rsid="00d108e5" officeooo:paragraph-rsid="00d108e5"/>
    </style:style>
    <style:style style:name="P20" style:family="paragraph" style:parent-style-name="Text_20_body">
      <style:text-properties officeooo:rsid="00d14441" officeooo:paragraph-rsid="00d14441"/>
    </style:style>
    <style:style style:name="P21" style:family="paragraph" style:parent-style-name="Text_20_body">
      <style:text-properties officeooo:paragraph-rsid="00d14441"/>
    </style:style>
    <style:style style:name="P22" style:family="paragraph" style:parent-style-name="Text_20_body">
      <style:text-properties officeooo:paragraph-rsid="00d108e5"/>
    </style:style>
    <style:style style:name="P23" style:family="paragraph" style:parent-style-name="Text_20_body">
      <style:text-properties officeooo:paragraph-rsid="00d23a47"/>
    </style:style>
    <style:style style:name="P24" style:family="paragraph" style:parent-style-name="Нумеруемый_20_раздел">
      <style:paragraph-properties fo:break-before="page"/>
    </style:style>
    <style:style style:name="P25" style:family="paragraph" style:parent-style-name="Нумеруемый_20_раздел">
      <style:text-properties officeooo:rsid="00d23a47" officeooo:paragraph-rsid="00d23a47"/>
    </style:style>
    <style:style style:name="P26" style:family="paragraph" style:parent-style-name="Титульный">
      <style:paragraph-properties fo:break-before="page"/>
    </style:style>
    <style:style style:name="T1" style:family="text">
      <style:text-properties officeooo:rsid="001f2943"/>
    </style:style>
    <style:style style:name="T2" style:family="text">
      <style:text-properties officeooo:rsid="00aa1155"/>
    </style:style>
    <style:style style:name="T3" style:family="text">
      <style:text-properties style:font-name-complex="Times New Roman1" style:font-size-complex="14pt"/>
    </style:style>
    <style:style style:name="T4" style:family="text">
      <style:text-properties officeooo:rsid="00bc657f"/>
    </style:style>
    <style:style style:name="T5" style:family="text">
      <style:text-properties officeooo:rsid="00be3b93"/>
    </style:style>
    <style:style style:name="T6" style:family="text">
      <style:text-properties officeooo:rsid="00bed50a"/>
    </style:style>
    <style:style style:name="T7" style:family="text">
      <style:text-properties officeooo:rsid="00c021ca"/>
    </style:style>
    <style:style style:name="T8" style:family="text">
      <style:text-properties fo:font-weight="normal" officeooo:rsid="00c1863a" style:font-weight-asian="normal" style:font-weight-complex="normal"/>
    </style:style>
    <style:style style:name="T9" style:family="text">
      <style:text-properties officeooo:rsid="00c75def"/>
    </style:style>
    <style:style style:name="T10" style:family="text">
      <style:text-properties officeooo:rsid="00c947dd"/>
    </style:style>
    <style:style style:name="T11" style:family="text">
      <style:text-properties officeooo:rsid="00cced2b"/>
    </style:style>
    <style:style style:name="T12" style:family="text">
      <style:text-properties officeooo:rsid="00cec8bd"/>
    </style:style>
    <style:style style:name="T13" style:family="text">
      <style:text-properties officeooo:rsid="00cf12d9"/>
    </style:style>
    <style:style style:name="T14" style:family="text">
      <style:text-properties officeooo:rsid="00d14441"/>
    </style:style>
    <style:style style:name="T15" style:family="text">
      <style:text-properties officeooo:rsid="00d23a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  <text:notes-configuration text:note-class="end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Figure"/>
        <text:sequence-decl text:display-outline-level="2" text:separation-character="." text:name="Формула"/>
        <text:sequence-decl text:display-outline-level="0" text:name="Листинг"/>
        <text:sequence-decl text:display-outline-level="0" text:name="Контрольный_вопрос"/>
      </text:sequence-decls>
      <text:section text:style-name="Sect1" text:name="Основной раздел">
        <text:p text:style-name="Титульный">Министерство науки и высшего образования Российской Федерации</text:p>
        <text:p text:style-name="Титульный">Федеральное государственное автономное образовательное</text:p>
        <text:p text:style-name="Титульный">учреждение высшего образования "Томский государственный университет систем управления и радиоэлектроники" (ТУСУР)</text:p>
        <text:p text:style-name="Титульный"/>
        <text:p text:style-name="Титульный"/>
        <text:p text:style-name="Титульный">Кафедра конструирования деталей и узлов радиоэлектронной аппаратуры (КУДР)</text:p>
        <text:p text:style-name="Титульный"/>
        <text:p text:style-name="Титульный"/>
        <text:p text:style-name="Титульный"/>
        <text:p text:style-name="Титульный"/>
        <text:p text:style-name="Титульный">КОНТРОЛЛЕР ШАГОВОГО ДВИГАТЕЛЯ</text:p>
        <text:p text:style-name="Титульный">ОТЧЁТ</text:p>
        <text:p text:style-name="Титульный">по курсовой работе</text:p>
        <text:p text:style-name="Титульный">по дисциплине «Программирование микроконтроллеров»</text:p>
        <text:p text:style-name="Титульный"/>
        <text:p text:style-name="Титульный"/>
        <text:p text:style-name="Титульный"/>
        <text:p text:style-name="Титульный"/>
        <text:p text:style-name="Титульный"/>
        <text:p text:style-name="Титульный_20__2014__20_Выполнили">Студенты гр. 234-2</text:p>
        <text:p text:style-name="Титульный_20__2014__20_Выполнили">_______ Кулманаков И.В.</text:p>
        <text:p text:style-name="Титульный_20__2014__20_Выполнили">«___»______ 2026 г.</text:p>
        <text:p text:style-name="Титульный_20__2014__20_Выполнили">Руководитель:</text:p>
        <text:p text:style-name="Титульный_20__2014__20_Выполнили">старший преподаватель</text:p>
        <text:p text:style-name="Титульный_20__2014__20_Выполнили">кафедры КУДР</text:p>
        <text:p text:style-name="Титульный_20__2014__20_Выполнили">_______ Пащенко А.К.</text:p>
        <text:p text:style-name="Титульный_20__2014__20_Выполнили">«___»______ 2026 г.</text:p>
        <text:p text:style-name="P26">Федеральное государственное автономное образовательное</text:p>
        <text:p text:style-name="Титульный">учреждение высшего образования "Томский государственный университет систем управления и радиоэлектроники" (ТУСУР)</text:p>
        <text:p text:style-name="Титульный"/>
        <text:p text:style-name="Титульный"/>
        <text:p text:style-name="Титульный">Кафедра конструирования деталей и узлов радиоэлектронной аппаратуры (КУДР)</text:p>
        <text:p text:style-name="Титульный">ЗАДАНИЕ</text:p>
        <text:p text:style-name="Титульный">к курсовой работе по дисциплине «Программирование микроконтроллеров»</text:p>
        <text:p text:style-name="Титульный">студента Кулманакова Ильи Владимировича гр. 234-2</text:p>
        <text:p text:style-name="Text_20_body">1. Тема работы: Контроллер шагового двигателя.</text:p>
        <text:p text:style-name="Text_20_body">2. Постановка задачи: разработать контроллер шагового двигателя. Работа должна быть выполнена с использованием отладочной платы Arduino UNO, Multishield, модуля на базе транзисторного повторителя ULN2003 и шагового двигателя 28BYJ-48. Контроллер должен управляться кнопками A1–A3. Для увеличения скорости вращения использовать кнопку А1, для уменьшения А3, для изменения направления вращения – А2. На семисегментном индикаторе отобразить интенсивность вращения в количестве шагов в секунду.</text:p>
        <text:p text:style-name="Text_20_body">3. Срок сдачи законченной работы: 05.06.2026 г.</text:p>
        <text:p text:style-name="Text_20_body">4. Среда разработки: Arduino IDE.</text:p>
        <text:p text:style-name="Text_20_body">5. Исходные данные: методические указания к выполнению курсовой работы <text:span text:style-name="T5">[</text:span><text:span text:style-name="T5"><text:note text:id="ftn0" text:note-class="endnote"><text:note-citation>1</text:note-citation><text:note-body><text:p text:style-name="P4">Бомбизов А.А. Методические указания к выполнению курсовой работы по дисциплине «Программирование микроконтроллеров». 20<text:span text:style-name="T6">22</text:span>. [Электронный ресурс]: сайт <text:span text:style-name="T7">«</text:span>Научно-образовательный портал ТУСУР<text:span text:style-name="T7">»</text:span>. URL: https://edu.tusur.ru/publications/10033/download (дата обращения: <text:span text:style-name="T6">15</text:span>.0<text:span text:style-name="T6">5</text:span>.20<text:span text:style-name="T6">26</text:span>).</text:p></text:note-body></text:note></text:span><text:span text:style-name="T5">]</text:span>.</text:p>
        <text:p text:style-name="Text_20_body">6. Содержание и состав пояснительной записки к курсовой работе:</text:p>
        <text:p text:style-name="Text_20_body">1) титульный лист;</text:p>
        <text:p text:style-name="Text_20_body">2) индивидуальное задание;</text:p>
        <text:p text:style-name="Text_20_body">3) оглавление;</text:p>
        <text:p text:style-name="Text_20_body">4) введение;</text:p>
        <text:p text:style-name="Text_20_body">5) анализ индивидуального задания;</text:p>
        <text:p text:style-name="Text_20_body"><text:soft-page-break/>6) описание логики и алгоритма (сценария) разрабатываемого устройства, сборка макета;</text:p>
        <text:p text:style-name="Text_20_body">7) разработка программного обеспечения в соответствии с индивидуальным заданием;</text:p>
        <text:p text:style-name="Text_20_body">8) описание плана и проведение тестирования работающего на макете программного обеспечения;</text:p>
        <text:p text:style-name="Text_20_body">9) заключение;</text:p>
        <text:p text:style-name="Text_20_body">10) список использованных источников;</text:p>
        <text:p text:style-name="Text_20_body">11) <text:span text:style-name="T4">п</text:span>риложение с листингом программы.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Титульный_20__2014__20_Выполнили">Студент гр. 234-2</text:p>
        <text:p text:style-name="Титульный_20__2014__20_Выполнили">_______ Кулманаков И.В.</text:p>
        <text:p text:style-name="Титульный_20__2014__20_Выполнили">«___»______ 2026 г.</text:p>
        <text:p text:style-name="Титульный_20__2014__20_Выполнили">Руководитель курсовой работы:</text:p>
        <text:p text:style-name="Титульный_20__2014__20_Выполнили">старший преподаватель</text:p>
        <text:p text:style-name="Титульный_20__2014__20_Выполнили">кафедры КУДР</text:p>
        <text:p text:style-name="Титульный_20__2014__20_Выполнили">_______ Пащенко А.К.</text:p>
        <text:p text:style-name="Титульный_20__2014__20_Выполнили">«___»______ 2026 г.</text:p>
        <text:p text:style-name="P14"/>
        <text:table-of-content text:style-name="Sect2" text:protected="true" text:name="Оглавление1">
          <text:table-of-content-source text:outline-level="10">
            <text:index-title-template text:style-name="Heading">Оглавление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Оглавление1_Head" text:protected="true">
              <text:h text:style-name="Heading" text:outline-level="1">Оглавление</text:h>
            </text:index-title>
            <text:p text:style-name="P3"><text:a xlink:type="simple" xlink:href="#__RefHeading___Toc1008_2214727365" text:style-name="Index_20_Link" text:visited-style-name="Index_20_Link">Введение<text:tab/>5</text:a></text:p>
            <text:p text:style-name="P3"><text:a xlink:type="simple" xlink:href="#__RefHeading___Toc14755_2214727365" text:style-name="Index_20_Link" text:visited-style-name="Index_20_Link">1. АНАЛИЗ ИНДИВИДУАЛЬНОГО ЗАДАНИЯ<text:tab/>6</text:a></text:p>
            <text:p text:style-name="P3"><text:a xlink:type="simple" xlink:href="#__RefHeading___Toc14757_2214727365" text:style-name="Index_20_Link" text:visited-style-name="Index_20_Link">2. ХОД РАЗРАБОТКИ УСТРОЙСТВА<text:tab/>7</text:a></text:p>
            <text:p text:style-name="P3"><text:a xlink:type="simple" xlink:href="#__RefHeading___Toc14759_2214727365" text:style-name="Index_20_Link" text:visited-style-name="Index_20_Link">2.1. Аппаратная часть<text:tab/>7</text:a></text:p>
            <text:p text:style-name="P3"><text:a xlink:type="simple" xlink:href="#__RefHeading___Toc1010_2214727365" text:style-name="Index_20_Link" text:visited-style-name="Index_20_Link">Заключение<text:tab/>8</text:a></text:p>
            <text:p text:style-name="P3"><text:a xlink:type="simple" xlink:href="#__RefHeading___Toc1012_2214727365" text:style-name="Index_20_Link" text:visited-style-name="Index_20_Link">Список использованных источников<text:tab/>9</text:a></text:p>
            <text:p text:style-name="P3"><text:a xlink:type="simple" xlink:href="#__RefHeading___Toc19959_2214727365" text:style-name="Index_20_Link" text:visited-style-name="Index_20_Link">Приложение А (обязательное) Листинг программы<text:tab/>11</text:a></text:p>
          </text:index-body>
        </text:table-of-content>
        <text:p text:style-name="Text_20_body"/>
        <text:p text:style-name="Text_20_body"/>
        <text:h text:style-name="P1" text:outline-level="1"><text:bookmark-start text:name="__RefHeading___Toc1008_2214727365"/>Введение<text:bookmark-end text:name="__RefHeading___Toc1008_2214727365"/></text:h>
        <text:p text:style-name="Text_20_body">Тема курсовой работы: «Контроллер шагового двигателя».</text:p>
        <text:p text:style-name="Text_20_body">Шаговые двигатели имеют широкое применение в промышленности: от принтеров до полноразмерных станков ЧПУ. Для работы шаговых двигателей необходим специальный контроллер, который в определённой последовательности отправляет сигнал на обмотки двигателя.</text:p>
        <text:p text:style-name="Text_20_body">Целью настоящей работы является освоение принципов управления униполярным шаговым двигателем с использованием транзисторных ключей, управляемых микроконтроллером.</text:p>
        <text:p text:style-name="Text_20_body"/>
        <text:p text:style-name="Text_20_body"/>
        <text:list xml:id="list214902664" text:style-name="Нумерация_20_разделов">
          <text:list-item>
            <text:h text:style-name="P24" text:outline-level="1"><text:bookmark-start text:name="__RefHeading___Toc14755_2214727365"/>АНАЛИЗ ИНДИВИДУАЛЬНОГО ЗАДАНИЯ<text:bookmark-end text:name="__RefHeading___Toc14755_2214727365"/></text:h>
          </text:list-item>
        </text:list>
        <text:p text:style-name="P17">Для выполнения данной курсовой работы был<text:span text:style-name="T12">и</text:span> выдан<text:span text:style-name="T12">ы следующие устройства:</text:span></text:p>
        <text:list text:style-name="Numbering_20_123">
          <text:list-item>
            <text:p text:style-name="P13">Arduino UNO;</text:p>
          </text:list-item>
          <text:list-item>
            <text:p text:style-name="P13">Multi-function-shield;</text:p>
          </text:list-item>
          <text:list-item>
            <text:p text:style-name="P13">шаговый двигатель 28BYJ-48;</text:p>
          </text:list-item>
          <text:list-item>
            <text:p text:style-name="P13">транзисторный повторитель ULN2003.</text:p>
          </text:list-item>
        </text:list>
        <text:p text:style-name="P15">Была предоставлена техническая документация на микроконтроллер ATmega328 [<text:note text:id="ftn1" text:note-class="endnote"><text:note-citation>2</text:note-citation><text:note-body><text:p text:style-name="P6"><text:span text:style-name="T5">Atmel 8-bit microcontroller with 4/8/16/32kbytes in-system programmable flash datasheet [Электронный ресурс]: </text:span><text:span text:style-name="T9">Курс: Программирование микроконтроллеров, гр. 234-2, Весенний семестр 2025/2026 у.г. (Журнал)</text:span><text:span text:style-name="T5">. URL: </text:span>https://sdo.tusur.ru/pluginfile.php/867453/mod_folder/content/0/Atmel-8271-8-bit-AVR-Microcontroller-ATmega48A-48PA-88A-88PA-168A-168PA-328-328P_datasheet_Complete%284%29.pdf <text:span text:style-name="T5">(дата обращения: </text:span><text:span text:style-name="T6">15</text:span><text:span text:style-name="T5">.0</text:span><text:span text:style-name="T6">5</text:span><text:span text:style-name="T5">.20</text:span><text:span text:style-name="T6">26</text:span><text:span text:style-name="T5">).</text:span></text:p></text:note-body></text:note>], <text:span text:style-name="T13">платы</text:span> Arduino UNO [<text:note text:id="ftn2" text:note-class="endnote"><text:note-citation>3</text:note-citation><text:note-body><text:p text:style-name="Endnote">Arduino UNO Reference Design <text:span text:style-name="T5">[Электронный ресурс]: </text:span><text:span text:style-name="T9">Курс: Программирование микроконтроллеров, гр. 234-2, Весенний семестр 2025/2026 у.г. (Журнал)</text:span><text:span text:style-name="T5">. URL: https://sdo.tusur.ru/pluginfile.php/ 867453/mod_folder/content/0/arduino-uno-schematic.pdf (дата обращения: </text:span><text:span text:style-name="T6">15</text:span><text:span text:style-name="T5">.0</text:span><text:span text:style-name="T6">5</text:span><text:span text:style-name="T5">.20</text:span><text:span text:style-name="T6">26</text:span><text:span text:style-name="T5">).</text:span></text:p></text:note-body></text:note>] и Multi-function-shield [<text:note text:id="ftn3" text:note-class="endnote"><text:note-citation>4</text:note-citation><text:note-body><text:p text:style-name="P7">Multi-function-shield <text:span text:style-name="T10">— Schematic Prints </text:span><text:span text:style-name="T5">[Электронный ресурс]: </text:span><text:span text:style-name="T9">Курс: Программирование микроконтроллеров, гр. 234-2, Весенний семестр 2025/2026 у.г. (Журнал)</text:span><text:span text:style-name="T5">. URL: https://sdo.tusur.ru/pluginfile.php/ 867453/mod_folder/content/0/Multi-function-shield_sch.pdf (дата обращения: </text:span><text:span text:style-name="T6">15</text:span><text:span text:style-name="T5">.0</text:span><text:span text:style-name="T6">5</text:span><text:span text:style-name="T5">.20</text:span><text:span text:style-name="T6">26</text:span><text:span text:style-name="T5">).</text:span></text:p></text:note-body></text:note>].</text:p>
        <text:p text:style-name="P16">Работа с семисегментным индикатором выполнялась на основе методических указаний к лабораторной работе <text:span text:style-name="T11">«Вывод информации»</text:span> [<text:note text:id="ftn4" text:note-class="endnote"><text:note-citation>5</text:note-citation><text:note-body><text:p text:style-name="P5"><text:span text:style-name="T5">А.А. Бомбизов, А.Г. Лощилов, А.К. Пащенко ВЫВОД ИНФОРМАЦИИ Методические указания к выполнению лабораторной и самостоятельной работы по дисциплине «Программирование микроконтроллеров» [Электронный ресурс]: </text:span>Курс: Программирование микроконтроллеров, гр. 234-2, Весенний семестр 2025/2026 у.г. (Журнал)<text:span text:style-name="T5">. URL: https://sdo.tusur.ru/pluginfile.php/867453/mod_folder/content/0/%D0%9F%D0%9C.%D0%9C%D0%B5%D1%82.%D0%92%D1%8B%D0%B2%D0%BE%D0%B4%D0%98%D0%BD%D1%84%D0%BE%D1%80%D0%BC</text:span><text:soft-page-break/><text:span text:style-name="T5">%D0%B0%D1%86%D0%B8%D0%B8%285%29.pdf (дата обращения: </text:span><text:span text:style-name="T6">15</text:span><text:span text:style-name="T5">.0</text:span><text:span text:style-name="T6">5</text:span><text:span text:style-name="T5">.20</text:span><text:span text:style-name="T6">26</text:span><text:span text:style-name="T5">).</text:span></text:p></text:note-body></text:note>].</text:p>
        <text:p text:style-name="P18">Была найдена техническая документация на шаговый двигатель <text:s/>28BYJ-48 [<text:note text:id="ftn5" text:note-class="endnote"><text:note-citation>6</text:note-citation><text:note-body><text:p text:style-name="P8">шаговый</text:p></text:note-body></text:note>] и транзисторный повторитель ULN2003 [<text:note text:id="ftn6" text:note-class="endnote"><text:note-citation>7</text:note-citation><text:note-body><text:p text:style-name="P8">транзисторный повторитель</text:p></text:note-body></text:note>].</text:p>
        <text:p text:style-name="P19">Принципиальная электрическая схема модуля драйвера [<text:note text:id="ftn7" text:note-class="endnote"><text:note-citation>8</text:note-citation><text:note-body><text:p text:style-name="P9">Принципиальная электрическая схема модуля драйвера <text:span text:style-name="T5">[Электронный ресурс]: </text:span>Драйвер шагового двигателя модуль ULN2003 подключение Arduino - MUUH <text:span text:style-name="T5">URL: </text:span>http://www.muuh.ru/shagovye-dvigateli/ 303-drajver-shagovogo-dvigatelya-modul-uln2003-podklyuchenie-arduino.html<text:span text:style-name="T5"> (дата обращения: </text:span><text:span text:style-name="T6">15</text:span><text:span text:style-name="T5">.0</text:span><text:span text:style-name="T6">5</text:span><text:span text:style-name="T5">.20</text:span><text:span text:style-name="T6">26</text:span><text:span text:style-name="T5">).</text:span></text:p></text:note-body></text:note>] представлена на рисунке <text:sequence-ref text:reference-format="value" text:ref-name="refDrawing0">1.1</text:sequence-ref>.</text:p>
        <text:p text:style-name="Абзац_20_рисунка"><draw:frame draw:style-name="fr1" draw:name="Изображение1" text:anchor-type="as-char" svg:width="9.419cm" svg:height="9.382cm" draw:z-index="0"><draw:image xlink:href="Pictures/10000001000001F4000001F24C5CA889.png" xlink:type="simple" xlink:show="embed" xlink:actuate="onLoad" draw:mime-type="image/png"/></draw:frame></text:p>
        <text:p text:style-name="P2">Рисунок <text:sequence text:ref-name="refDrawing0" text:name="Drawing" text:formula="ooow:Drawing+1" style:num-format="1">1.1</text:sequence><text:s/>— Принципиальная электрическая схема модуля драйвера</text:p>
        <text:p text:style-name="P22"/>
        <text:list text:continue-list="list214902664" text:style-name="Нумерация_20_разделов">
          <text:list-item>
            <text:h text:style-name="P24" text:outline-level="1">ОПИСАНИЕ ЛОГИКИ И АЛГОРИТМА</text:h>
          </text:list-item>
        </text:list>
        <text:p text:style-name="Text_20_body"/>
        <text:p text:style-name="Text_20_body"/>
        <text:p text:style-name="Text_20_body"/>
        <text:list text:continue-numbering="true" text:style-name="Нумерация_20_разделов">
          <text:list-item>
            <text:h text:style-name="Нумеруемый_20_раздел" text:outline-level="1">СБОРКА МАКЕТА</text:h>
          </text:list-item>
        </text:list>
        <text:p text:style-name="P23">Управление шаговым двигателем реализуется по четырём проводам, которые представляют из себя фазы питания обмоток. Следовательно, для уменьшения задержки и одновременного переключения уровня на ключах лучше использовать один порт микроконтроллера для управления двигателем. <text:span text:style-name="T15">Согласно [</text:span><text:span text:style-name="T15"><text:note-ref text:note-class="endnote" text:reference-format="text" text:ref-name="ftn2">3</text:note-ref></text:span><text:span text:style-name="T15">] и [</text:span><text:span text:style-name="T15"><text:note-ref text:note-class="endnote" text:reference-format="text" text:ref-name="ftn3">4</text:note-ref></text:span><text:span text:style-name="T15">] </text:span>На данную роль подходит PORTD: PD0, PD1, PD5 и PD6 остались незадействованными и имеют доступ в виде разъёмов для подключения.</text:p>
        <text:p text:style-name="Text_20_body"/>
        <text:p text:style-name="Text_20_body"/>
        <text:list text:continue-numbering="true" text:style-name="Нумерация_20_разделов">
          <text:list-item>
            <text:h text:style-name="P25" text:outline-level="1"><text:bookmark-start text:name="__RefHeading___Toc14757_2214727365"/>РАЗРАБОТКА ПРОГРАММНОГО ОБЕСПЕЧЕНИЯ<text:bookmark-end text:name="__RefHeading___Toc14757_2214727365"/></text:h>
            <text:list>
              <text:list-item>
                <text:h text:style-name="Нумеруемый_20_раздел" text:outline-level="1"><text:bookmark-start text:name="__RefHeading___Toc14759_2214727365"/>Аппаратная часть<text:bookmark-end text:name="__RefHeading___Toc14759_2214727365"/></text:h>
              </text:list-item>
            </text:list>
          </text:list-item>
        </text:list>
        <text:p text:style-name="Text_20_body">Шаговый двигатель 28BYJ-48 является униполярным – для управления необходимо поочерёдно подавать сигнал на 4 провода. Является достаточным подавать нулевой потенциал, т.к. общий провод подключен к питанию 5В.</text:p>
        <text:p text:style-name="Text_20_body"/>
        <text:p text:style-name="Text_20_body"/>
        <text:p text:style-name="Text_20_body"/>
        <text:list text:continue-numbering="true" text:style-name="Нумерация_20_разделов">
          <text:list-item>
            <text:h text:style-name="P24" text:outline-level="1">ОПИСАНИЕ ПЛАНА И ПРОВЕДЕНИЕ ТЕСТИРОВАНИЯ</text:h>
          </text:list-item>
        </text:list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P1" text:outline-level="1"><text:bookmark-start text:name="__RefHeading___Toc1010_2214727365"/>Заключение<text:bookmark-end text:name="__RefHeading___Toc1010_2214727365"/></text:h>
        <text:p text:style-name="P21">В ходе выполнения работы <text:span text:style-name="T14">было выполнено </text:span>освоение принципов управления униполярным шаговым двигателем с использованием транзисторных ключей, управляемых микроконтроллером.</text:p>
        <text:p text:style-name="P20"/>
        <text:p text:style-name="Text_20_body"/>
        <text:p text:style-name="Text_20_body"/>
        <text:h text:style-name="P1" text:outline-level="1"><text:bookmark-start text:name="__RefHeading___Toc1012_2214727365"/>Список использованных источников<text:bookmark-end text:name="__RefHeading___Toc1012_2214727365"/></text:h>
      </text:section>
      <text:p text:style-name="Text_20_body"/>
      <text:p text:style-name="Text_20_body"/>
      <text:h text:style-name="P11" text:outline-level="1"><text:bookmark-start text:name="__RefHeading___Toc19959_2214727365"/>Приложение А<text:line-break/><text:span text:style-name="T8">(обязательное)<text:line-break/></text:span>Листинг программы<text:bookmark-end text:name="__RefHeading___Toc19959_2214727365"/></text:h>
      <text:p text:style-name="Text_20_body"/>
      <text:p text:style-name="Preformatted_20_Text">// # Работа с экраном.</text:p>
      <text:p text:style-name="Preformatted_20_Text"/>
      <text:p text:style-name="Preformatted_20_Text">#define CHAR_NULL 10;</text:p>
      <text:p text:style-name="Preformatted_20_Text"/>
      <text:p text:style-name="Preformatted_20_Text">char chars[] = {</text:p>
      <text:p text:style-name="Preformatted_20_Text"><text:s text:c="2"/>0b11111100, // 0</text:p>
      <text:p text:style-name="Preformatted_20_Text"><text:s text:c="2"/>0b01100000, // 1</text:p>
      <text:p text:style-name="Preformatted_20_Text"><text:s text:c="2"/>0b11011010, // 2</text:p>
      <text:p text:style-name="Preformatted_20_Text"><text:s text:c="2"/>0b11110010, // 3</text:p>
      <text:p text:style-name="Preformatted_20_Text"><text:s text:c="2"/>0b01100110, // 4</text:p>
      <text:p text:style-name="Preformatted_20_Text"><text:s text:c="2"/>0b10110110, // 5</text:p>
      <text:p text:style-name="Preformatted_20_Text"><text:s text:c="2"/>0b10111110, // 6</text:p>
      <text:p text:style-name="Preformatted_20_Text"><text:s text:c="2"/>0b11100000, // 7</text:p>
      <text:p text:style-name="Preformatted_20_Text"><text:s text:c="2"/>0b11111110, // 8</text:p>
      <text:p text:style-name="Preformatted_20_Text"><text:s text:c="2"/>0b11110110, // 9</text:p>
      <text:p text:style-name="Preformatted_20_Text"><text:s text:c="2"/>0b00000000, // null</text:p>
      <text:p text:style-name="Preformatted_20_Text">};</text:p>
      <text:p text:style-name="Preformatted_20_Text"/>
      <text:p text:style-name="Preformatted_20_Text">void sendBit(char data) {</text:p>
      <text:p text:style-name="Preformatted_20_Text"><text:s text:c="2"/>if (data &amp; 1) {</text:p>
      <text:p text:style-name="Preformatted_20_Text"><text:s text:c="4"/>PORTB |= 1;</text:p>
      <text:p text:style-name="Preformatted_20_Text"><text:s text:c="2"/>} else {</text:p>
      <text:p text:style-name="Preformatted_20_Text"><text:s text:c="4"/>PORTB &amp;= ~1;</text:p>
      <text:p text:style-name="Preformatted_20_Text"><text:s text:c="2"/>}</text:p>
      <text:p text:style-name="Preformatted_20_Text"><text:s text:c="2"/>PORTD |= 1&lt;&lt;7;</text:p>
      <text:p text:style-name="Preformatted_20_Text"><text:s text:c="2"/>PORTD &amp;= ~(1&lt;&lt;7);</text:p>
      <text:p text:style-name="Preformatted_20_Text">}</text:p>
      <text:p text:style-name="Preformatted_20_Text"/>
      <text:p text:style-name="Preformatted_20_Text">void sendByte(char data) {</text:p>
      <text:p text:style-name="Preformatted_20_Text"><text:s text:c="2"/>for (int i = 0; i &lt; 8; i++) {</text:p>
      <text:p text:style-name="Preformatted_20_Text"><text:s text:c="4"/>sendBit(data);</text:p>
      <text:p text:style-name="Preformatted_20_Text"><text:s text:c="4"/>data &gt;&gt;= 1;</text:p>
      <text:p text:style-name="Preformatted_20_Text"><text:s text:c="2"/>}</text:p>
      <text:p text:style-name="Preformatted_20_Text">}</text:p>
      <text:p text:style-name="Preformatted_20_Text"/>
      <text:p text:style-name="Preformatted_20_Text">void passNumbers() {</text:p>
      <text:p text:style-name="Preformatted_20_Text"><text:soft-page-break/><text:s text:c="2"/>PORTD |= 1&lt;&lt;4;</text:p>
      <text:p text:style-name="Preformatted_20_Text"><text:s text:c="2"/>PORTD &amp;= ~(1&lt;&lt;4);</text:p>
      <text:p text:style-name="Preformatted_20_Text">}</text:p>
      <text:p text:style-name="Preformatted_20_Text"/>
      <text:p text:style-name="Preformatted_20_Text">char currentChars[4] = {0b01100000, 0b11110110, 0b11111110, 0b01100110};</text:p>
      <text:p text:style-name="Preformatted_20_Text">char index = 0;</text:p>
      <text:p text:style-name="Preformatted_20_Text"/>
      <text:p text:style-name="Preformatted_20_Text">void sendCurrentChar() {</text:p>
      <text:p text:style-name="Preformatted_20_Text"><text:s text:c="2"/>sendByte(~currentChars[index]);</text:p>
      <text:p text:style-name="Preformatted_20_Text"><text:s text:c="2"/>sendByte(1 &lt;&lt; (7 - index));</text:p>
      <text:p text:style-name="Preformatted_20_Text"><text:s text:c="2"/>passNumbers();</text:p>
      <text:p text:style-name="Preformatted_20_Text"><text:s text:c="2"/>index = (index + 1) &amp; 0b11;</text:p>
      <text:p text:style-name="Preformatted_20_Text">}</text:p>
      <text:p text:style-name="Preformatted_20_Text"/>
      <text:p text:style-name="Preformatted_20_Text">void printNumber(int number) {</text:p>
      <text:p text:style-name="Preformatted_20_Text"><text:s text:c="2"/>currentChars[0] = chars[(number/1000)%10];</text:p>
      <text:p text:style-name="Preformatted_20_Text"><text:s text:c="2"/>currentChars[1] = chars[(number/100 )%10];</text:p>
      <text:p text:style-name="Preformatted_20_Text"><text:s text:c="2"/>currentChars[2] = chars[(number/10 <text:s/>)%10];</text:p>
      <text:p text:style-name="Preformatted_20_Text"><text:s text:c="2"/>currentChars[3] = chars[(number <text:s text:c="4"/>)%10];</text:p>
      <text:p text:style-name="Preformatted_20_Text">}</text:p>
      <text:p text:style-name="Preformatted_20_Text"/>
      <text:p text:style-name="Preformatted_20_Text">// # Работа с шаговым двигателем.</text:p>
      <text:p text:style-name="Preformatted_20_Text">char stepSequence[] = {</text:p>
      <text:p text:style-name="Preformatted_20_Text"><text:s text:c="2"/>0b01100000, // 0</text:p>
      <text:p text:style-name="Preformatted_20_Text"><text:s text:c="2"/>0b00100010, // 1</text:p>
      <text:p text:style-name="Preformatted_20_Text"><text:s text:c="2"/>0b00000011, // 2</text:p>
      <text:p text:style-name="Preformatted_20_Text"><text:s text:c="2"/>0b01000001, // 3</text:p>
      <text:p text:style-name="Preformatted_20_Text">};</text:p>
      <text:p text:style-name="Preformatted_20_Text"/>
      <text:p text:style-name="Preformatted_20_Text">char flagDirection = 0;</text:p>
      <text:p text:style-name="Preformatted_20_Text">int counter = 205;</text:p>
      <text:p text:style-name="Preformatted_20_Text"/>
      <text:p text:style-name="Preformatted_20_Text">char currentStep = 0;</text:p>
      <text:p text:style-name="Preformatted_20_Text">uint32_t lastStepAt = 0;</text:p>
      <text:p text:style-name="Preformatted_20_Text"/>
      <text:p text:style-name="Preformatted_20_Text">void sendNextStep() {</text:p>
      <text:p text:style-name="Preformatted_20_Text"><text:s text:c="2"/>if ((millis() - lastStepAt) &lt; (1000 / counter)) {</text:p>
      <text:p text:style-name="Preformatted_20_Text"><text:s text:c="4"/>return;</text:p>
      <text:p text:style-name="Preformatted_20_Text"><text:s text:c="2"/>}</text:p>
      <text:p text:style-name="Preformatted_20_Text"><text:s text:c="2"/></text:p>
      <text:p text:style-name="Preformatted_20_Text"><text:s text:c="2"/>lastStepAt += 1000 / counter;</text:p>
      <text:p text:style-name="Preformatted_20_Text"><text:s text:c="2"/></text:p>
      <text:p text:style-name="Preformatted_20_Text"><text:soft-page-break/><text:s text:c="2"/>currentStep = (currentStep + 1 - flagDirection * 2) &amp; 0b11;</text:p>
      <text:p text:style-name="Preformatted_20_Text"><text:s text:c="2"/>PORTD = (PORTD &amp; ~0b01100011) | stepSequence[currentStep];</text:p>
      <text:p text:style-name="Preformatted_20_Text">};</text:p>
      <text:p text:style-name="Preformatted_20_Text"/>
      <text:p text:style-name="Preformatted_20_Text">// # Кнопки</text:p>
      <text:p text:style-name="Preformatted_20_Text">uint32_t lastInteraptionAt = 0;</text:p>
      <text:p text:style-name="Preformatted_20_Text"/>
      <text:p text:style-name="Preformatted_20_Text">void readButtons() {</text:p>
      <text:p text:style-name="Preformatted_20_Text"><text:s text:c="2"/>char newButtonState = (~PINC &gt;&gt; 1) &amp; 0b111;</text:p>
      <text:p text:style-name="Preformatted_20_Text"><text:s text:c="2"/></text:p>
      <text:p text:style-name="Preformatted_20_Text"><text:s text:c="2"/>if (newButtonState == 0) {</text:p>
      <text:p text:style-name="Preformatted_20_Text"><text:s text:c="4"/>return;</text:p>
      <text:p text:style-name="Preformatted_20_Text"><text:s text:c="2"/>}</text:p>
      <text:p text:style-name="Preformatted_20_Text"/>
      <text:p text:style-name="Preformatted_20_Text"><text:s text:c="2"/>if (millis() - lastInteraptionAt &lt; 100) {</text:p>
      <text:p text:style-name="Preformatted_20_Text"><text:s text:c="4"/>return;</text:p>
      <text:p text:style-name="Preformatted_20_Text"><text:s text:c="2"/>}</text:p>
      <text:p text:style-name="Preformatted_20_Text"/>
      <text:p text:style-name="Preformatted_20_Text"><text:s text:c="2"/>lastInteraptionAt = millis();</text:p>
      <text:p text:style-name="Preformatted_20_Text"><text:s text:c="2"/></text:p>
      <text:p text:style-name="Preformatted_20_Text"><text:s text:c="2"/>switch (newButtonState) {</text:p>
      <text:p text:style-name="Preformatted_20_Text"><text:s text:c="4"/>case 0b100:</text:p>
      <text:p text:style-name="Preformatted_20_Text"><text:s text:c="6"/>counter -= 10;</text:p>
      <text:p text:style-name="Preformatted_20_Text"><text:s text:c="4"/>break;</text:p>
      <text:p text:style-name="Preformatted_20_Text"><text:s text:c="4"/>case 0b010:</text:p>
      <text:p text:style-name="Preformatted_20_Text"><text:s text:c="6"/>flagDirection ^= 1;</text:p>
      <text:p text:style-name="Preformatted_20_Text"><text:s text:c="4"/>break;</text:p>
      <text:p text:style-name="Preformatted_20_Text"><text:s text:c="4"/>case 0b001:</text:p>
      <text:p text:style-name="Preformatted_20_Text"><text:s text:c="6"/>counter += 10;</text:p>
      <text:p text:style-name="Preformatted_20_Text"><text:s text:c="4"/>break;</text:p>
      <text:p text:style-name="Preformatted_20_Text"><text:s text:c="2"/>}</text:p>
      <text:p text:style-name="Preformatted_20_Text">}</text:p>
      <text:p text:style-name="Preformatted_20_Text"/>
      <text:p text:style-name="Preformatted_20_Text">// Инициализация</text:p>
      <text:p text:style-name="Preformatted_20_Text"/>
      <text:p text:style-name="Preformatted_20_Text">void setup() {</text:p>
      <text:p text:style-name="Preformatted_20_Text"><text:s text:c="2"/>DDRB = 0b00000001;</text:p>
      <text:p text:style-name="Preformatted_20_Text"><text:s text:c="2"/>DDRC = 0b00000000;</text:p>
      <text:p text:style-name="Preformatted_20_Text"><text:s text:c="2"/>DDRD = 0b11110011;</text:p>
      <text:p text:style-name="Preformatted_20_Text"/>
      <text:p text:style-name="Preformatted_20_Text"><text:s text:c="2"/>// TC2.</text:p>
      <text:p text:style-name="Preformatted_20_Text"><text:s text:c="2"/>TIMSK2 = (1&lt;&lt;TOIE2);</text:p>
      <text:p text:style-name="P12"><text:soft-page-break/><text:s text:c="2"/>// Тактирование с делителем 256.</text:p>
      <text:p text:style-name="P12"><text:s text:c="2"/>TCCR2B = (1 &lt;&lt; CS21) | (1 &lt;&lt; CS21) | (0 &lt;&lt; CS20);</text:p>
      <text:p text:style-name="Preformatted_20_Text"><text:s text:c="2"/>OCR2A = 200;</text:p>
      <text:p text:style-name="Preformatted_20_Text"/>
      <text:p text:style-name="Preformatted_20_Text"><text:s text:c="2"/>// PCINT.</text:p>
      <text:p text:style-name="Preformatted_20_Text"><text:s text:c="2"/>PCICR |= 1&lt;&lt;1;</text:p>
      <text:p text:style-name="Preformatted_20_Text"><text:s text:c="2"/>PCMSK1 |= 0b1110;</text:p>
      <text:p text:style-name="Preformatted_20_Text"><text:s text:c="2"/></text:p>
      <text:p text:style-name="Preformatted_20_Text"><text:s text:c="2"/>sei();</text:p>
      <text:p text:style-name="Preformatted_20_Text"><text:s text:c="2"/></text:p>
      <text:p text:style-name="Preformatted_20_Text"><text:s text:c="2"/>printNumber(counter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sendNextStep();</text:p>
      <text:p text:style-name="Preformatted_20_Text">}</text:p>
      <text:p text:style-name="Preformatted_20_Text"/>
      <text:p text:style-name="Preformatted_20_Text">// Таймер</text:p>
      <text:p text:style-name="Preformatted_20_Text">ISR(TIMER2_OVF_vect) {</text:p>
      <text:p text:style-name="Preformatted_20_Text"><text:s text:c="2"/>sendCurrentChar();</text:p>
      <text:p text:style-name="Preformatted_20_Text">}</text:p>
      <text:p text:style-name="Preformatted_20_Text"/>
      <text:p text:style-name="Preformatted_20_Text">// Кнопки</text:p>
      <text:p text:style-name="Preformatted_20_Text">ISR(PCINT1_vect) {</text:p>
      <text:p text:style-name="Preformatted_20_Text"><text:s text:c="2"/>readButtons();</text:p>
      <text:p text:style-name="Preformatted_20_Text"><text:s text:c="2"/>printNumber(counter);</text:p>
      <text:p text:style-name="Preformatted_20_Text"><text:s text:c="2"/>currentChars[0] |= flagDirection;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text-align="center" style:justify-single-word="false" style:page-number="auto" fo:keep-with-next="always">
        <style:tab-stops/>
      </style:paragraph-properties>
      <style:text-properties fo:font-weight="bold"/>
    </style:style>
    <style:style style:name="Text_20_body" style:display-name="Text body" style:family="paragraph" style:parent-style-name="Standard" style:class="text">
      <style:paragraph-properties fo:margin-left="0cm" fo:margin-right="0cm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итульный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Титульный_20__2014__20_Выполнили" style:display-name="Титульный — Выполнили" style:family="paragraph" style:parent-style-name="Standard" style:master-page-name="">
      <style:paragraph-properties fo:margin-left="9.999cm" fo:margin-right="0cm" fo:text-align="start" style:justify-single-word="false" fo:text-indent="0cm" style:auto-text-indent="false" style:page-number="auto">
        <style:tab-stops/>
      </style:paragraph-properties>
    </style:style>
    <style:style style:name="Нумеруемый_20_раздел" style:display-name="Нумеруемый раздел" style:family="paragraph" style:parent-style-name="Heading" style:next-style-name="Text_20_body" style:default-outline-level="1" style:list-style-name="Нумерация_20_разделов" style:master-page-name="">
      <style:paragraph-properties style:page-number="auto" style:snap-to-layout-grid="true">
        <style:tab-stops/>
      </style:paragraph-properties>
    </style:style>
    <style:style style:name="Drawing" style:family="paragraph" style:parent-style-name="Caption" style:class="extra"/>
    <style:style style:name="Абзац_20_рисунка" style:display-name="Абзац рисунка" style:family="paragraph" style:parent-style-name="Standard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/>
    <style:style style:name="Абзац_20_формулы" style:display-name="Абзац формулы" style:family="paragraph" style:parent-style-name="Standard" style:next-style-name="Text_20_body" style:master-page-name="">
      <style:paragraph-properties style:page-number="auto">
        <style:tab-stops>
          <style:tab-stop style:position="0cm"/>
          <style:tab-stop style:position="7.999cm" style:type="center"/>
          <style:tab-stop style:position="16.499cm" style:type="right"/>
        </style:tab-stops>
      </style:paragraph-properties>
    </style:style>
    <style:style style:name="Абзац_20_таблицы" style:display-name="Абзац таблицы" style:family="paragraph" style:parent-style-name="Standard" style:next-style-name="Text_20_body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названия_20_таблицы" style:display-name="Абзац названия таблицы" style:family="paragraph" style:parent-style-name="Text_20_body" style:next-style-name="Абзац_20_таблицы" style:master-page-name="">
      <style:paragraph-properties style:page-number="auto" fo:keep-with-next="alway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 style:master-page-name="">
      <style:paragraph-properties fo:text-indent="1.251cm" style:auto-text-indent="false" style:page-number="auto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0% 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ация_20_разделов" style:display-name="Нумерация разделов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3%.%4%.%5%.%6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4%.%5%.%6%.%7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5%.%6%.%7%.%8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6%.%7%.%8%.%9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7%.%8%.%9%.%10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Standard" style:num-suffix=". " style:num-format="1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1f2943"/>
    </style:style>
    <style:style style:name="MT2" style:family="text">
      <style:text-properties officeooo:rsid="00aa1155"/>
    </style:style>
    <style:page-layout style:name="Mpm1">
      <style:page-layout-properties fo:page-width="21.001cm" fo:page-height="29.7cm" style:num-format="1" style:print-orientation="portrait" fo:margin-top="2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5</text:page-number></text:p>
      </style:footer>
      <style:footer-first>
        <text:p text:style-name="Footer"><text:tab/><text:span text:style-name="MT1">Томск 202</text:span><text:span text:style-name="MT2">6</text:span></text:p>
      </style:footer-first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21:21:43.527777960</meta:creation-date>
    <meta:generator>LibreOffice/24.2.7.2$Linux_X86_64 LibreOffice_project/420$Build-2</meta:generator>
    <dc:date>2026-05-15T12:09:41.626896637</dc:date>
    <meta:editing-duration>PT12H27M3S</meta:editing-duration>
    <meta:editing-cycles>82</meta:editing-cycles>
    <meta:document-statistic meta:table-count="0" meta:image-count="1" meta:object-count="0" meta:page-count="15" meta:paragraph-count="217" meta:word-count="1088" meta:character-count="9126" meta:non-whitespace-character-count="8039"/>
  </office:meta>
</office:document-meta>
</file>